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le: You are a High-Level Decision-Making Agent for drone navigation. Your task is to analyze multi-modal inputs (visual map + textual knowledge) to determine whether to explore unknown areas or focus on target localization. --- **Contextual Inputs** 1. **Mission Objective** - Target: {task_prior_knowledge['Target']} - Key Spatial Constraints: - Landmark Relationships: "{task_prior_knowledge['Relationships with Landmarks']}" - Surroundings: "{task_prior_knowledge['Surrounding']}" - Surroundings-Target Spatial Context: "{task_prior_knowledge['Spatial_Relationships with objects']}" 2. **Operational History** - Recent Actions: {', '.join(history_actions)} - Previously Selected AOIs: {', '.join(history_AOI)} 3. **Visual Context (Map)** - Grid System: Columns (A-Z), Rows (1-N). Current drone position marked with orientation arrow. - Map Layers: - Landmarks: Predefined static objects with labels - Explored Area: Regions already scanned (green overlay) - Current View: Drone's visible area (blue overlay) - Suspected Targets: Detected objects matching target description (cyan regions) - Surrounding Obstacles: Other detected objects (magenta regions) --- **Decision-Making Protocol** Analyze the following aspects in sequence: 1. **Spatial Reasoning** - Compare target's expected location (from Prior Knowledge) against suspected target positions on the map. - Calculate grid-based distance between drone's current position and potential target AOIs. 2. **Exploration-Localization Tradeoff** - IF (Uncertainty &gt; 60%) OR (No high-confidence target detected in viewed areas): → Prioritize exploring unknown grids adjacent to landmark-related AOIs. - ELSE IF (Target-like objects found in grids matching prior knowledge): → Focus on localizing within {N} grids around suspected AOI. 3. **AOI Selection Criteria** - Prefer grids that: a) Align with landmark relationships (e.g., "north of Church") b) Maximize coverage of unexplored areas c) Minimize backtracking (avoid revisiting &gt;2 times) --- **Required Output Format** ```json { "decision": "Explore|Locate", "selected_aoi": "GridID (e.g., C3)", "rationale": { "spatial_consistency": "Score 1-5 (How well AOI matches prior knowledge)", "exploration_priority": "Score 1-5 (Urgency to scan new areas)", "confidence": "0-100% likelihood of correct decision" }, "navigation_instruction": "Move [direction] for [X] grids towards [landmark]" }"""</text:p>
      <text:p text:style-name="Standard"/>
      <text:p text:style-name="Standard"/>
      <text:p text:style-name="Standard">'```json\n{\n <text:s/>"decision": "Locate",\n <text:s/>"selected_aoi": "D14",\n <text:s/>"rationale": {\n <text:s text:c="3"/>"spatial_consistency": "5",\n <text:s text:c="3"/>"exploration_priority": "2",\n <text:s text:c="3"/>"confidence": "85%"\n <text:s/>},\n <text:s/>"navigation_instruction": "Move slightly forward for 3 grids towards the row of grayish brown houses near Wellington Road."\n}\n```\n\n---\n\n### **Detailed Analysis:**\n\n#### 1. **Spatial Reasoning**\n- **Target\'s Expected Location:** <text:s/>\n <text:s text:c="2"/>- According to the mission objective, the target is a row of grayish brown houses located to the left of a gray house at the intersection of Leslie Road and Wellington Road.\n <text:s text:c="2"/>- The map shows a cluster of suspected targets (cyan regions) around grid D14-E16, which aligns with the description of being near the intersection.\n\n- **Current Position vs. Target AOI:** <text:s/>\n <text:s text:c="2"/>- The drone\'s current position is marked by the orange arrow near grid T20-U21. \n <text:s text:c="2"/>- The distance between the current position and the suspected target area (D14-E16) is approximately 10-12 grids.\n\n#### 2. **Exploration-Localization Tradeoff**\n- **Uncertainty Assessment:** <text:s/>\n <text:s text:c="2"/>- There are high-confidence suspected targets in the cyan region near D14-E16, matching the prior knowledge about the target\'s location relative to landmarks.\n <text:s text:c="2"/>- Uncertainty is low as the suspected targets are within expected spatial constraints.\n\n- **Action Priority:** <text:s/>\n <text:s text:c="2"/>- Since there are detected objects that match the target description and align with prior knowledge, the focus should be on localizing the target rather than exploring unknown areas.\n\n#### 3. **AOI Selection Criteria**\n- **Landmark Relationships:** <text:s/>\n <text:s text:c="2"/>- Grid D14-E16 is close to the labeled landmark "Wellington Road" and matches the spatial context provided ("to the left of the gray house").\n <text:s text:c="2"/>- This satisfies the alignment with landmark relationships.\n\n- **Coverage of Unexplored Areas:** <text:s/>\n <text:s text:c="2"/>- While some unexplored areas remain, the priority is to confirm the presence of the target in the suspected AOI before expanding further.\n\n- **Minimize Backtracking:** <text:s/>\n <text:s text:c="2"/>- Moving toward D14-E16 does not require revisiting previously explored areas, minimizing backtracking.\n\n---\n\n### **Conclusion:**\nThe decision is to **Locate** the <text:soft-page-break/>target within the selected AOI (D14). The spatial consistency is high, exploration priority is moderate, and confidence in this decision is strong based on the alignment with prior knowledge and visual evidence.'</text:p>
      <text:p text:style-name="Standard"/>
      <text:p text:style-name="Standard"/>
      <text:p text:style-name="Standard">{'decision': 'Locate', 'selected_aoi': 'D14', 'rationale': {'spatial_consistency': '5', 'exploration_priority': '2', 'confidence': '85%'}, 'navigation_instruction': 'Move slightly forward for 3 grids towards the row of grayish brown houses near Wellington Road.'}</text:p>
      <text:p text:style-name="Standard"/>
      <text:p text:style-name="Standard"/>
      <text:p text:style-name="Standard">You are a language navigation assistant. Your task is to analyze complex navigation instructions and extract the following structured information in JSON format:</text:p>
      <text:p text:style-name="Standard">- Target: The main object or location to be navigated to. And list its attributes such as color, shape, etc.</text:p>
      <text:p text:style-name="Standard">- Landmarks: Any referenced Geosptial names that help identify the target's position. Note that landmarks are usually capitalized names of streets, roads, etc. List the relationships between the target and landmarks, and mention the secondary landmarks if the target near the intersection of two landmarks.</text:p>
      <text:p text:style-name="Standard">- Surrounding: Any referenced objects, environmental or contextual information not part of the main landmarks but provides additional clues.</text:p>
      <text:p text:style-name="Standard">- Spatial Relationships with objects: The spatial and positional relationships between the target and landmarks.</text:p>
      <text:p text:style-name="Standard"/>
      <text:p text:style-name="Standard">Provide your answer in JSON format.</text:p>
      <text:p text:style-name="Standard"/>
      <text:p text:style-name="Standard">Instruction: "A dark blue car near the corner of Beche Road and Priory Road next to the Cellarer's Chequer building"</text:p>
      <text:p text:style-name="Standard">{</text:p>
      <text:p text:style-name="Standard"><text:s text:c="2"/>"Target": {</text:p>
      <text:p text:style-name="Standard"><text:s text:c="4"/>"object": "car",</text:p>
      <text:p text:style-name="Standard"><text:s text:c="4"/>"attribute":{</text:p>
      <text:p text:style-name="Standard"><text:s text:c="8"/>"color": "dark blue",</text:p>
      <text:p text:style-name="Standard"><text:s text:c="4"/>}</text:p>
      <text:p text:style-name="Standard"><text:s text:c="2"/>},</text:p>
      <text:p text:style-name="Standard"><text:s text:c="2"/>"Relationships with Landmarks": {</text:p>
      <text:p text:style-name="Standard"><text:s text:c="4"/>"intersection": ["Beche Road", "Priory Road"], # return none if no intersection</text:p>
      <text:p text:style-name="Standard"><text:s text:c="4"/>"Landmark":{</text:p>
      <text:p text:style-name="Standard"><text:s text:c="8"/>"Beche Road": "near the Beche Road",</text:p>
      <text:p text:style-name="Standard"><text:s text:c="8"/>"Priory Road": "near the Priory Road",</text:p>
      <text:p text:style-name="Standard"><text:s text:c="8"/>"Cellarer's Chequer": "next to the Cellarer's Chequer building"</text:p>
      <text:p text:style-name="Standard"><text:s text:c="4"/>}</text:p>
      <text:p text:style-name="Standard"><text:s text:c="2"/>},</text:p>
      <text:p text:style-name="Standard"><text:s text:c="2"/>"Surrounding": ["buildings", "streets"],</text:p>
      <text:p text:style-name="Standard"><text:s text:c="2"/>"Spatial_Relationships with objects": [</text:p>
      <text:p text:style-name="Standard"><text:s text:c="4"/>"The dark blue car is next to the Cellarer's Chequer building"</text:p>
      <text:p text:style-name="Standard"><text:s text:c="2"/>]</text:p>
      <text:p text:style-name="Standar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0:46:29.262637036</meta:creation-date>
    <dc:date>2025-02-16T22:34:27.090589319</dc:date>
    <meta:editing-duration>PT1H47M58S</meta:editing-duration>
    <meta:editing-cycles>2</meta:editing-cycles>
    <meta:generator>LibreOffice/7.3.7.2$Linux_X86_64 LibreOffice_project/30$Build-2</meta:generator>
    <meta:document-statistic meta:table-count="0" meta:image-count="0" meta:object-count="0" meta:page-count="2" meta:paragraph-count="30" meta:word-count="877" meta:character-count="6627" meta:non-whitespace-character-count="5665"/>
  </office:meta>
</office:document-meta>
</file>